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Tessera — Viewer Test Document</text:p>
      <text:p text:style-name="Author">Tessera</text:p>
      <text:p text:style-name="Date">2026</text:p>
      <text:h text:style-name="Heading_20_1" text:outline-level="1"><text:bookmark-start text:name="overview"/>Overview<text:bookmark-end text:name="overview"/></text:h>
      <text:p text:style-name="First_20_paragraph"><text:span text:style-name="T1">Tessera</text:span> is a minimal tiling terminal workspace. This document exists so you can confirm the in-app office viewer renders Word/ODF files correctly.</text:p>
      <text:h text:style-name="Heading_20_1" text:outline-level="1"><text:bookmark-start text:name="supported-assets"/>Supported assets<text:bookmark-end text:name="supported-assets"/></text:h>
      <text:list text:style-name="L1">
        <text:list-item>
          <text:p text:style-name="P1">Images: png, jpg, webp, bmp, ico, tiff, svg</text:p>
        </text:list-item>
        <text:list-item>
          <text:p text:style-name="P1">Documents: pdf, doc(x), odt, ppt(x), odp, xls(x), ods</text:p>
        </text:list-item>
        <text:list-item>
          <text:p text:style-name="P1">Text &amp; code: highlighted in the editor</text:p>
        </text:list-item>
        <text:list-item>
          <text:p text:style-name="P1">Everything else: an info card with <text:span text:style-name="T2">Open externally</text:span></text:p>
        </text:list-item>
      </text:list>
      <text:h text:style-name="Heading_20_1" text:outline-level="1"><text:bookmark-start text:name="how-it-works"/>How it works<text:bookmark-end text:name="how-it-works"/></text:h>
      <text:p text:style-name="First_20_paragraph">Office files are converted to PDF in the background and rasterized page by page, so the UI never blocks while a large document render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3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>Tessera — Viewer Test Document</dc:title>
    <dc:description/>
    <dc:subject/>
    <meta:keyword/>
    <meta:initial-creator>Tessera</meta:initial-creator>
    <dc:creator>Tessera</dc:creator>
    <meta:creation-date>2026-06-19T00:36:35Z</meta:creation-date>
    <dc:date>2026-06-19T00:36:35Z</dc:date>
    <meta:user-defined meta:name="date" meta:value-type="string">2026</meta:user-defined>
  </office:meta>
</office:document-meta>
</file>