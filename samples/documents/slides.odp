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essera" draw:style-name="dp1" draw:master-page-name="Title_20_Slide" presentation:presentation-page-layout-name="AL1T0"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Tessera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<text:line-break/></text:span><text:span text:style-name="T2"><text:line-break/></text:span><text:span text:style-name="T2">Sample Dec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sera (2)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ssera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6"><text:span text:style-name="T3">A minimal tiling terminal workspa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er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iewer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8"><text:span text:style-name="T3">Images and vectors</text:span></text:p>
              </text:list-item>
              <text:list-item>
                <text:p text:style-name="P8"><text:span text:style-name="T3">PDF and office documents</text:span></text:p>
              </text:list-item>
              <text:list-item>
                <text:p text:style-name="P8"><text:span text:style-name="T3">Highlighted text &amp; co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idgeShot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BridgeShot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6"><text:span text:style-name="T3">Capture, draw numbered boxes, label them, export a PNG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ssera</dc:title>
    <meta:initial-creator>Sample Deck</meta:initial-creator>
    <meta:creation-date>2026-06-19T00:36:35</meta:creation-date>
    <dc:date>2026-06-19T00:36:35</dc:date>
    <meta:document-statistic meta:object-count="150"/>
    <meta:generator>LibreOffice/24.2.7.2$Linux_X86_64 LibreOffice_project/420$Build-2</meta:generator>
  </office:meta>
</office:document-meta>
</file>